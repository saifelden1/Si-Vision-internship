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c119" officeooo:paragraph-rsid="0013c119" style:font-weight-asian="bold" style:font-weight-complex="bold"/>
    </style:style>
    <style:style style:name="P2" style:family="paragraph" style:parent-style-name="Standard">
      <style:text-properties fo:font-weight="normal" officeooo:rsid="0013cd07" officeooo:paragraph-rsid="0013cd07" style:font-weight-asian="normal" style:font-weight-complex="normal"/>
    </style:style>
    <style:style style:name="P3" style:family="paragraph" style:parent-style-name="Standard">
      <style:text-properties fo:color="#bbbebf" loext:opacity="100%" style:font-name="Consolas" fo:font-size="10.5pt" fo:font-weight="normal" officeooo:rsid="0013cd07" officeooo:paragraph-rsid="0013cd07" fo:background-color="#121314" style:font-weight-asian="normal" style:font-weight-complex="normal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fo:background-color="#121314"/>
    </style:style>
    <style:style style:name="T1" style:family="text">
      <style:text-properties fo:color="#ff7b72" loext:opacity="100%"/>
    </style:style>
    <style:style style:name="T2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 Tourial</text:p>
      <text:p text:style-name="P1"/>
      <text:p text:style-name="P2">SET TO SET A VAR</text:p>
      <text:p text:style-name="P2"/>
      <text:p text:style-name="P2">MESSAGES WILL HAVE SOME LIKE FALGES TO DIFFRENTIATE BETWEEN DIFFRENT MESSAGES</text:p>
      <text:p text:style-name="P2"/>
      <text:p text:style-name="P2"/>
      <text:p text:style-name="P2">MAKE exc→ <text:s/>we make an excutable saying that we need to make a bin and it depend on the following c files</text:p>
      <text:p text:style-name="P3"><text:span text:style-name="T1">add_executable</text:span>( CmakeExc </text:p>
      <text:p text:style-name="P4">              <text:span text:style-name="T2">$(SRS_FIles)   </text:span></text:p>
      <text:p text:style-name="P4">              <text:span text:style-name="T2">)</text:span></text:p>
      <text:p text:style-name="P2"/>
      <text:p text:style-name="P2">also we add the inculds files with the target _ include _directories</text:p>
      <text:p text:style-name="P2"/>
      <text:p text:style-name="P2">for messages we have (messges(Fetal_Erorr for example ) so it generates an erorr and goes out and so on 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8T11:56:41.216763100</meta:creation-date>
    <dc:date>2026-07-08T18:13:17.953017000</dc:date>
    <meta:editing-duration>PT4H20M16S</meta:editing-duration>
    <meta:editing-cycles>1</meta:editing-cycles>
    <meta:document-statistic meta:table-count="0" meta:image-count="0" meta:object-count="0" meta:page-count="1" meta:paragraph-count="9" meta:word-count="75" meta:character-count="452" meta:non-whitespace-character-count="351"/>
    <meta:generator>LibreOffice/26.2.3.2$Windows_X86_64 LibreOffice_project/70e089b17412e4cb7773e41413306b17a2328c34</meta:generator>
  </office:meta>
</office:document-meta>
</file>